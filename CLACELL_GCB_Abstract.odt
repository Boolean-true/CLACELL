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elzeile">
      <style:paragraph-properties fo:margin-top="0in" fo:margin-bottom="0.0835in" style:contextual-spacing="false"/>
    </style:style>
    <style:style style:name="P2" style:family="paragraph" style:parent-style-name="Autoren">
      <style:paragraph-properties fo:margin-top="0in" fo:margin-bottom="0.1665in" style:contextual-spacing="false"/>
      <style:text-properties officeooo:paragraph-rsid="0014fd46"/>
    </style:style>
    <style:style style:name="P3" style:family="paragraph" style:parent-style-name="Haupttext">
      <style:text-properties style:font-name="Arial" fo:language="en" fo:country="US" style:font-name-complex="Arial1"/>
    </style:style>
    <style:style style:name="P4" style:family="paragraph" style:parent-style-name="Haupttext">
      <style:text-properties style:font-name="Arial" fo:language="en" fo:country="US" officeooo:rsid="002029ee" officeooo:paragraph-rsid="002029ee" style:font-name-complex="Arial1"/>
    </style:style>
    <style:style style:name="T1" style:family="text">
      <style:text-properties style:font-name="Arial" fo:language="en" fo:country="US"/>
    </style:style>
    <style:style style:name="T2" style:family="text">
      <style:text-properties style:text-position="0% 100%" style:font-name="Arial" fo:language="en" fo:country="US" style:font-name-complex="Arial1"/>
    </style:style>
    <style:style style:name="T3" style:family="text">
      <style:text-properties style:font-name="Arial" fo:language="en" fo:country="US" style:text-underline-style="solid" style:text-underline-width="auto" style:text-underline-color="font-color" officeooo:rsid="000dd5b2" style:font-name-complex="Arial1"/>
    </style:style>
    <style:style style:name="T4" style:family="text">
      <style:text-properties style:font-name="Arial" fo:language="en" fo:country="US" style:text-underline-style="solid" style:text-underline-width="auto" style:text-underline-color="font-color" officeooo:rsid="000e181c" style:font-name-complex="Arial1"/>
    </style:style>
    <style:style style:name="T5" style:family="text">
      <style:text-properties style:text-position="super 58%" style:font-name="Arial" fo:language="en" fo:country="US" style:text-underline-style="solid" style:text-underline-width="auto" style:text-underline-color="font-color" officeooo:rsid="00133ee6" style:font-name-complex="Arial1"/>
    </style:style>
    <style:style style:name="T6" style:family="text">
      <style:text-properties style:font-name="Arial" fo:language="en" fo:country="US" officeooo:rsid="000dd5b2" style:font-name-complex="Arial1"/>
    </style:style>
    <style:style style:name="T7" style:family="text">
      <style:text-properties style:text-position="super 58%" style:font-name="Arial" fo:language="en" fo:country="US" officeooo:rsid="00133ee6" style:font-name-complex="Arial1"/>
    </style:style>
    <style:style style:name="T8" style:family="text">
      <style:text-properties style:font-name="Arial" fo:language="en" fo:country="US" officeooo:rsid="00100138" style:font-name-complex="Arial1"/>
    </style:style>
    <style:style style:name="T9" style:family="text">
      <style:text-properties style:text-position="0% 100%" style:font-name="Arial" fo:language="en" fo:country="US" officeooo:rsid="00133ee6" style:font-name-complex="Arial1"/>
    </style:style>
    <style:style style:name="T10" style:family="text">
      <style:text-properties style:font-name="Arial" fo:language="en" fo:country="US" officeooo:rsid="00133ee6" style:font-name-complex="Arial1"/>
    </style:style>
    <style:style style:name="T11" style:family="text">
      <style:text-properties style:font-name="Arial" fo:language="en" fo:country="US" style:font-name-complex="Arial1"/>
    </style:style>
    <style:style style:name="T12" style:family="text">
      <style:text-properties officeooo:rsid="001c733a"/>
    </style:style>
    <style:style style:name="T13" style:family="text">
      <style:text-properties fo:font-weight="bold"/>
    </style:style>
    <style:style style:name="T14" style:family="text">
      <style:text-properties officeooo:rsid="001d05f5"/>
    </style:style>
    <style:style style:name="T15" style:family="text">
      <style:text-properties officeooo:rsid="001ee969"/>
    </style:style>
    <style:style style:name="T16" style:family="text">
      <style:text-properties officeooo:rsid="0017bde1"/>
    </style:style>
    <style:style style:name="T17" style:family="text">
      <style:text-properties officeooo:rsid="0017e626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ed7e1" style:font-weight-asian="normal" style:font-weight-complex="normal"/>
    </style:style>
    <style:style style:name="T21" style:family="text">
      <style:text-properties fo:font-weight="normal" officeooo:rsid="003031bd" style:font-weight-asian="normal" style:font-weight-complex="normal"/>
    </style:style>
    <style:style style:name="T22" style:family="text">
      <style:text-properties fo:font-weight="normal" officeooo:rsid="00360357" style:font-weight-asian="normal" style:font-weight-complex="normal"/>
    </style:style>
    <style:style style:name="T23" style:family="text">
      <style:text-properties fo:font-weight="normal" officeooo:rsid="0039512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LACELL: Robust cell type classifier for immune cells</text:span></text:p>
      <text:p text:style-name="P2" loext:marker-style-name="T2"><text:span text:style-name="T3">Julian Kra</text:span><text:span text:style-name="T4">u</text:span><text:span text:style-name="T3">s</text:span><text:span text:style-name="T5">1</text:span><text:span text:style-name="T6">, David B. Blumenthal</text:span><text:span text:style-name="T7">1</text:span><text:span text:style-name="T6">, Anne Hartebro</text:span><text:span text:style-name="T8">d</text:span><text:span text:style-name="T6">t</text:span><text:span text:style-name="T7">1</text:span></text:p>
      <text:p text:style-name="P2" loext:marker-style-name="T2"><text:span text:style-name="T7">1</text:span><text:span text:style-name="T9">Biomedical Network Science Lab, Department Artificial Intelligence in Biomedical </text:span><text:span text:style-name="T10">Engineering, Friedrich-Alexander-Universität Erlangen-Nürnberg (FAU)</text:span></text:p>
      <text:p text:style-name="P3" loext:marker-style-name="T11">Single-cell RNA sequencing (scRNA-seq) has transformed genomic research by uncovering cellular heterogeneity, yet <text:span text:style-name="T12">robust</text:span> cell type classification remains a significant analytical bottleneck. While manual marker-based annotation is subjective and scale-limited, existing computational classifiers frequently struggle when deployed on complex immune tissues. State-of-the-art tools often suffer from high performance variance, sensitivity to gene dropout, and overfitting. Furthermore, a reliance on non-deterministic processes and hardware-intensive architectures limits reproducibility and accessibility. To address these challenges, we introduce CLACELL, an open-source Python framework engineered for the robust, deterministic, and resource-efficient classification of immune cells.</text:p>
      <text:p text:style-name="P3" loext:marker-style-name="T11"><text:span text:style-name="T13">Methods:</text:span> CLACELL utilizes a feature-subsampling ensemble paired with a <text:span text:style-name="T14">Linear SVM</text:span>. The framework was benchmarked against CellTypist, scGPT, and SingleR using in-distribution and out-of-distribution <text:span text:style-name="T15">(OOD)</text:span> scRNA-seq datasets. Performance and <text:span text:style-name="T16">robustness </text:span>were quantified via rigorous robustness tests, including random <text:span text:style-name="T17">feature </text:span>dropout, prediction stability across stochastic runs, and progressive feature importance dropout (removal of up to 2% of key marker genes).</text:p>
      <text:p text:style-name="P4" loext:marker-style-name="T11"><text:span text:style-name="T18">Results:</text:span> <text:span text:style-name="T19">CLACELL consistently outperforms CellTypist across most metrics and achieves superior generalization on OOD data compared to SingleR, which exhibited a strong tendency to overfit the training distribution. While the deep learning model scGPT </text:span><text:span text:style-name="T20">out</text:span><text:span text:style-name="T19">performed </text:span><text:span text:style-name="T20">CLACELL </text:span><text:span text:style-name="T19">on OOD data and demonstrated robustness to dropout, it suffered from high </text:span><text:span text:style-name="T21">variance and</text:span><text:span text:style-name="T19"> non-deterministic behavior and required GPU acceleration. </text:span><text:span text:style-name="T22">Therefore CLACELL provides an optimal balance of predictive accuracy, operational robustness, and strict reproducibility. </text:span><text:span text:style-name="T23">It enables researchers to perform reliable, zero-shot cell type annotations without the need for expensive High-Performance Computing infrastructure.</text:span></text:p>
      <text:p text:style-name="P3" loext:marker-style-name="T11"/>
      <text:p text:style-name="P3" loext:marker-style-name="T11"/>
      <text:p text:style-name="P3" loext:marker-style-name="T11"/>
      <text:p text:style-name="P3" loext:marker-style-name="T11"><text:soft-page-break/></text:p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left" style:justify-single-word="false" fo:orphans="2" fo:widows="2" style:punctuation-wrap="hanging" style:vertical-align="baseline" style:writing-mode="lr-tb"/>
      <style:text-properties style:font-name="Arial" fo:font-family="Arial" style:font-family-generic="swiss" style:font-pitch="variable"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elzeile" style:family="paragraph" style:parent-style-name="Haupttext" style:next-style-name="Autoren">
      <style:paragraph-properties fo:text-align="center" style:justify-single-word="false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Autoren" style:family="paragraph" style:parent-style-name="Haupttext">
      <style:paragraph-properties fo:text-align="center" style:justify-single-word="false"/>
      <style:text-properties fo:font-style="italic" style:font-style-asian="italic" style:font-style-complex="italic"/>
    </style:style>
    <style:style style:name="Subtitle" style:family="paragraph" style:parent-style-name="Haupttext" style:next-style-name="Haupttext" style:default-outline-level="2" style:list-style-name="" style:class="chapter">
      <style:paragraph-properties fo:margin-top="0.0835in" fo:margin-bottom="0.0835in" style:contextual-spacing="false" fo:text-align="left" style:justify-single-word="false"/>
      <style:text-properties fo:font-weight="bold" style:font-weight-asian="bold" style:font-name-complex="Arial1" style:font-family-complex="Arial" style:font-family-generic-complex="system" style:font-pitch-complex="variable" style:font-size-complex="12pt"/>
    </style:style>
    <style:style style:name="Haupttext" style:family="paragraph">
      <style:paragraph-properties fo:margin-top="0in" fo:margin-bottom="0in" style:contextual-spacing="false" fo:line-height="150%" fo:text-align="justify" style:justify-single-word="false" fo:orphans="2" fo:widows="2" style:writing-mode="lr-tb" loext:word-spacing-minimum="75%" loext:word-spacing-maximum="133%"/>
      <style:text-properties fo:font-size="12pt" fo:language="en" fo:country="GB" style:font-size-asian="12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Larissa-Design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Normvorlage</dc:title>
    <meta:initial-creator>Dr. L. Nick</meta:initial-creator>
    <meta:editing-cycles>32</meta:editing-cycles>
    <meta:print-date>2006-11-09T13:33:00</meta:print-date>
    <meta:creation-date>2025-09-29T08:12:00</meta:creation-date>
    <dc:date>2026-07-17T20:21:32.872728513</dc:date>
    <meta:editing-duration>PT14H40M57S</meta:editing-duration>
    <meta:generator>LibreOffice/26.2.4.2$Linux_X86_64 LibreOffice_project/620$Build-2</meta:generator>
    <meta:document-statistic meta:table-count="0" meta:image-count="0" meta:object-count="0" meta:page-count="2" meta:paragraph-count="6" meta:word-count="265" meta:character-count="2190" meta:non-whitespace-character-count="1931"/>
    <meta:user-defined meta:name="AppVersion">16.0000</meta:user-defined>
    <meta:user-defined meta:name="Company">DECHEMA e.V.</meta:user-defined>
    <meta:template xlink:type="simple" xlink:actuate="onRequest" xlink:title="NORMALLN.DOT" xlink:href=""/>
  </office:meta>
</office:document-meta>
</file>