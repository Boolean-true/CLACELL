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A000000B68C0158B7.png" manifest:media-type="image/png"/>
  <manifest:file-entry manifest:full-path="Pictures/1002DD6400006FD4000012CFF345D78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elzeile">
      <style:paragraph-properties fo:margin-top="0in" fo:margin-bottom="0.0835in" style:contextual-spacing="false"/>
    </style:style>
    <style:style style:name="P2" style:family="paragraph" style:parent-style-name="Autoren">
      <style:paragraph-properties fo:margin-top="0in" fo:margin-bottom="0.1665in" style:contextual-spacing="false"/>
      <style:text-properties officeooo:paragraph-rsid="0014fd46"/>
    </style:style>
    <style:style style:name="P3" style:family="paragraph" style:parent-style-name="Haupttext">
      <style:text-properties style:font-name="Arial" fo:language="en" fo:country="US" style:font-name-complex="Arial1"/>
    </style:style>
    <style:style style:name="P4" style:family="paragraph" style:parent-style-name="Figure">
      <style:text-properties fo:font-size="10pt" style:font-size-asian="10pt" style:font-size-complex="10pt"/>
    </style:style>
    <style:style style:name="P5" style:family="paragraph" style:parent-style-name="Haupttext">
      <style:text-properties style:font-name="Arial" fo:language="en" fo:country="US" officeooo:paragraph-rsid="002029ee" style:font-name-complex="Arial1"/>
    </style:style>
    <style:style style:name="T1" style:family="text">
      <style:text-properties style:font-name="Arial" fo:language="en" fo:country="US"/>
    </style:style>
    <style:style style:name="T2" style:family="text">
      <style:text-properties style:text-position="0% 100%" style:font-name="Arial" fo:language="en" fo:country="US" style:font-name-complex="Arial1"/>
    </style:style>
    <style:style style:name="T3" style:family="text">
      <style:text-properties style:font-name="Arial" fo:language="en" fo:country="US" style:text-underline-style="solid" style:text-underline-width="auto" style:text-underline-color="font-color" officeooo:rsid="000dd5b2" style:font-name-complex="Arial1"/>
    </style:style>
    <style:style style:name="T4" style:family="text">
      <style:text-properties style:font-name="Arial" fo:language="en" fo:country="US" style:text-underline-style="solid" style:text-underline-width="auto" style:text-underline-color="font-color" officeooo:rsid="000e181c" style:font-name-complex="Arial1"/>
    </style:style>
    <style:style style:name="T5" style:family="text">
      <style:text-properties style:text-position="super 58%" style:font-name="Arial" fo:language="en" fo:country="US" style:text-underline-style="none" officeooo:rsid="00133ee6" style:font-name-complex="Arial1"/>
    </style:style>
    <style:style style:name="T6" style:family="text">
      <style:text-properties style:font-name="Arial" fo:language="en" fo:country="US" officeooo:rsid="000dd5b2" style:font-name-complex="Arial1"/>
    </style:style>
    <style:style style:name="T7" style:family="text">
      <style:text-properties style:text-position="super 58%" style:font-name="Arial" fo:language="en" fo:country="US" officeooo:rsid="00133ee6" style:font-name-complex="Arial1"/>
    </style:style>
    <style:style style:name="T8" style:family="text">
      <style:text-properties style:font-name="Arial" fo:language="en" fo:country="US" officeooo:rsid="00100138" style:font-name-complex="Arial1"/>
    </style:style>
    <style:style style:name="T9" style:family="text">
      <style:text-properties style:text-position="0% 100%" style:font-name="Arial" fo:language="en" fo:country="US" officeooo:rsid="00133ee6" style:font-name-complex="Arial1"/>
    </style:style>
    <style:style style:name="T10" style:family="text">
      <style:text-properties style:font-name="Arial" fo:language="en" fo:country="US" officeooo:rsid="00133ee6" style:font-name-complex="Arial1"/>
    </style:style>
    <style:style style:name="T11" style:family="text">
      <style:text-properties style:font-name="Arial" fo:language="en" fo:country="US" style:font-name-complex="Arial1"/>
    </style:style>
    <style:style style:name="T12" style:family="text">
      <style:text-properties officeooo:rsid="00338a15"/>
    </style:style>
    <style:style style:name="T13" style:family="text">
      <style:text-properties fo:font-weight="bold"/>
    </style:style>
    <style:style style:name="T14" style:family="text">
      <style:text-properties officeooo:rsid="003a0aa1"/>
    </style:style>
    <style:style style:name="T15" style:family="text">
      <style:text-properties officeooo:rsid="001d05f5"/>
    </style:style>
    <style:style style:name="T16" style:family="text">
      <style:text-properties officeooo:rsid="001ee969"/>
    </style:style>
    <style:style style:name="T17" style:family="text">
      <style:text-properties officeooo:rsid="0017bde1"/>
    </style:style>
    <style:style style:name="T18" style:family="text">
      <style:text-properties officeooo:rsid="0038073f"/>
    </style:style>
    <style:style style:name="T19" style:family="text">
      <style:text-properties officeooo:rsid="0037a05b"/>
    </style:style>
    <style:style style:name="T20" style:family="text">
      <style:text-properties officeooo:rsid="0017e626"/>
    </style:style>
    <style:style style:name="T21" style:family="text">
      <style:text-properties fo:font-weight="bold" officeooo:rsid="002029ee" style:font-weight-asian="bold" style:font-weight-complex="bold"/>
    </style:style>
    <style:style style:name="T22" style:family="text">
      <style:text-properties officeooo:rsid="002029ee"/>
    </style:style>
    <style:style style:name="T23" style:family="text">
      <style:text-properties fo:font-weight="normal" officeooo:rsid="002029ee" style:font-weight-asian="normal" style:font-weight-complex="normal"/>
    </style:style>
    <style:style style:name="T24" style:family="text">
      <style:text-properties fo:font-weight="normal" officeooo:rsid="0039cb6d" style:font-weight-asian="normal" style:font-weight-complex="normal"/>
    </style:style>
    <style:style style:name="T25" style:family="text">
      <style:text-properties fo:font-weight="normal" officeooo:rsid="0039fa0c" style:font-weight-asian="normal" style:font-weight-complex="normal"/>
    </style:style>
    <style:style style:name="T26" style:family="text">
      <style:text-properties fo:font-weight="normal" officeooo:rsid="002ed7e1" style:font-weight-asian="normal" style:font-weight-complex="normal"/>
    </style:style>
    <style:style style:name="T27" style:family="text">
      <style:text-properties fo:font-weight="normal" officeooo:rsid="003031bd" style:font-weight-asian="normal" style:font-weight-complex="normal"/>
    </style:style>
    <style:style style:name="T28" style:family="text">
      <style:text-properties fo:font-weight="normal" officeooo:rsid="00360357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LACELL: Robust cell type classifier for immune cells</text:span></text:p>
      <text:p text:style-name="P2" loext:marker-style-name="T2"><text:span text:style-name="T3">Julian Kra</text:span><text:span text:style-name="T4">u</text:span><text:span text:style-name="T3">s</text:span><text:span text:style-name="T5">1</text:span><text:span text:style-name="T6">, David B. Blumenthal</text:span><text:span text:style-name="T7">1</text:span><text:span text:style-name="T6">, Anne Hartebro</text:span><text:span text:style-name="T8">d</text:span><text:span text:style-name="T6">t</text:span><text:span text:style-name="T7">1</text:span></text:p>
      <text:p text:style-name="P2" loext:marker-style-name="T2"><text:span text:style-name="T7">1</text:span><text:span text:style-name="T9">Biomedical Network Science Lab, Department Artificial Intelligence in Biomedical </text:span><text:span text:style-name="T10">Engineering, Friedrich-Alexander-Universität Erlangen-Nürnberg (FAU)</text:span></text:p>
      <text:p text:style-name="P3" loext:marker-style-name="T11">Single-cell RNA sequencing (scRNA-seq) has transformed genomic research by uncovering cellular heterogeneity, however robust cell type classification remains a significant analytical bottleneck. While manual marker-based annotation is subjective and scale-limited, existing computational classifiers frequently struggle when deployed on complex immune tissues. State-of-the-art models often suffer from high performance variance, sensitivity to gene dropout, and overfitting. To address these challenges, we introduce CLACELL, an open-source Python framework engineered for the robust and deterministic classification of immune cells.</text:p>
      <text:p text:style-name="P3" loext:marker-style-name="T11"><draw:frame draw:style-name="fr1" draw:name="Frame1" text:anchor-type="paragraph" svg:x="0.0209in" svg:y="0.002in" svg:width="6.2984in" draw:z-index="0"><draw:text-box fo:min-height="1.0591in"><text:p text:style-name="P4"><draw:frame draw:style-name="fr2" draw:name="Image1" text:anchor-type="paragraph" svg:width="6.2984in" style:rel-width="100%" svg:height="1.0591in" style:rel-height="scale" draw:z-index="1"><draw:image xlink:href="Pictures/1002DD6400006FD4000012CFF345D78D.svg" xlink:type="simple" xlink:show="embed" xlink:actuate="onLoad" draw:mime-type="image/svg+xml"/><draw:image xlink:href="Pictures/100000010000043A000000B68C0158B7.png" xlink:type="simple" xlink:show="embed" xlink:actuate="onLoad" draw:mime-type="image/png"/></draw:frame>Figure <text:sequence text:ref-name="refFigure0" text:name="Figure" text:formula="ooow:Figure+1" style:num-format="1">1</text:sequence>: Overview of the CLACELL <text:span text:style-name="T12">Annotation</text:span> Pipeline</text:p></draw:text-box></draw:frame><text:span text:style-name="T13">Methods:</text:span> CLACELL <text:span text:style-name="T14">uses</text:span> a feature-subsampling ensemble paired with a <text:span text:style-name="T15">Linear SVM</text:span>. The framework was benchmarked against CellTypist, scGPT, and SingleR using in-distribution and out-of-distribution <text:span text:style-name="T16">(OOD)</text:span> scRNA-seq datasets. Performance and <text:span text:style-name="T17">robustness </text:span>were <text:span text:style-name="T18">measured</text:span> via robustness tests, including <text:span text:style-name="T19">classification report, </text:span>random <text:span text:style-name="T20">feature </text:span>dropout, prediction stability, and progressive feature importance dropout (removal of up to 2% of key marker genes).</text:p>
      <text:p text:style-name="P5" loext:marker-style-name="T11"><text:span text:style-name="T21">Results:</text:span><text:span text:style-name="T22"> </text:span><text:span text:style-name="T23">CLACELL consistently outperforms CellTypist across most metrics and achieves superior generalization on OOD data compared to SingleR, which </text:span><text:span text:style-name="T24">showed</text:span><text:span text:style-name="T23"> a strong tendency to overfit </text:span><text:span text:style-name="T25">on </text:span><text:span text:style-name="T23">the training distribution. While the deep learning model scGPT </text:span><text:span text:style-name="T26">out</text:span><text:span text:style-name="T23">performed </text:span><text:span text:style-name="T26">CLACELL </text:span><text:span text:style-name="T23">on OOD data and demonstrated robustness to dropout, it suffered from high </text:span><text:span text:style-name="T27">variance and</text:span><text:span text:style-name="T23"> non-deterministic behavior and required GPU acceleration. </text:span><text:span text:style-name="T28">Therefore CLACELL provides an optimal balance of predictive accuracy, operational robustness, and strict reproducibilit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left" style:justify-single-word="false" fo:orphans="2" fo:widows="2" style:punctuation-wrap="hanging" style:vertical-align="baseline" style:writing-mode="lr-tb"/>
      <style:text-properties style:font-name="Arial" fo:font-family="Arial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elzeile" style:family="paragraph" style:parent-style-name="Haupttext" style:next-style-name="Autoren">
      <style:paragraph-properties fo:text-align="center" style:justify-single-word="false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Autoren" style:family="paragraph" style:parent-style-name="Haupttext">
      <style:paragraph-properties fo:text-align="center" style:justify-single-word="false"/>
      <style:text-properties fo:font-style="italic" style:font-style-asian="italic" style:font-style-complex="italic"/>
    </style:style>
    <style:style style:name="Subtitle" style:family="paragraph" style:parent-style-name="Haupttext" style:next-style-name="Haupttext" style:default-outline-level="2" style:list-style-name="" style:class="chapter">
      <style:paragraph-properties fo:margin-top="0.0835in" fo:margin-bottom="0.0835in" style:contextual-spacing="false" fo:text-align="left" style:justify-single-word="false"/>
      <style:text-properties fo:font-weight="bold" style:font-weight-asian="bold" style:font-name-complex="Arial1" style:font-family-complex="Arial" style:font-family-generic-complex="system" style:font-pitch-complex="variable" style:font-size-complex="12pt"/>
    </style:style>
    <style:style style:name="Haupttext" style:family="paragraph">
      <style:paragraph-properties fo:margin-top="0in" fo:margin-bottom="0in" style:contextual-spacing="false" fo:line-height="150%" fo:text-align="justify" style:justify-single-word="false" fo:orphans="2" fo:widows="2" style:writing-mode="lr-tb" loext:word-spacing-minimum="75%" loext:word-spacing-maximum="133%"/>
      <style:text-properties fo:font-size="12pt" fo:language="en" fo:country="GB" style:font-size-asian="12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Normvorlage</dc:title>
    <meta:initial-creator>Dr. L. Nick</meta:initial-creator>
    <meta:editing-cycles>54</meta:editing-cycles>
    <meta:print-date>2006-11-09T13:33:00</meta:print-date>
    <meta:creation-date>2025-09-29T08:12:00</meta:creation-date>
    <dc:date>2026-07-19T21:35:39.938211000</dc:date>
    <meta:editing-duration>PT19H12M48S</meta:editing-duration>
    <meta:generator>LibreOffice/26.2.4.2$Linux_X86_64 LibreOffice_project/620$Build-2</meta:generator>
    <meta:document-statistic meta:table-count="0" meta:image-count="1" meta:object-count="0" meta:page-count="1" meta:paragraph-count="7" meta:word-count="240" meta:character-count="1928" meta:non-whitespace-character-count="1695"/>
    <meta:user-defined meta:name="AppVersion">16.0000</meta:user-defined>
    <meta:user-defined meta:name="Company">DECHEMA e.V.</meta:user-defined>
    <meta:template xlink:type="simple" xlink:actuate="onRequest" xlink:title="NORMALLN.DOT" xlink:href=""/>
  </office:meta>
</office:document-meta>
</file>